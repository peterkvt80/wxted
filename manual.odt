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Heading_20_1">
      <style:text-properties style:font-name="Times New Roman1"/>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Times New Roman1"/>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text-properties style:font-name="Times New Roman1"/>
    </style:style>
    <style:style style:name="P40" style:family="paragraph" style:parent-style-name="Text_20_body">
      <style:text-properties style:font-name="Times New Roman1" fo:font-weight="normal" style:font-weight-asian="normal" style:font-weight-complex="normal"/>
    </style:style>
    <style:style style:name="P41" style:family="paragraph" style:parent-style-name="Text_20_body" style:list-style-name="L9">
      <style:text-properties style:font-name="Times New Roman1" fo:font-weight="normal" style:font-weight-asian="normal" style:font-weight-complex="normal"/>
    </style:style>
    <style:style style:name="P42" style:family="paragraph" style:parent-style-name="Text_20_body">
      <style:text-properties style:font-name="Times New Roman1" fo:font-weight="bold" style:font-weight-asian="bold" style:font-weight-complex="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6</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20403286" text:style-name="L1">
        <text:list-item>
          <text:p text:style-name="P29">Get the program by download from <text:a xlink:type="simple" xlink:href="http://www.teastop.co.uk/teletext/wxTED.zip">http://www.teastop.co.uk/teletext/wxTED</text:a></text:p>
        </text:list-item>
        <text:list-item>
          <text:p text:style-name="P29">Unzip into a handy folder. </text:p>
        </text:list-item>
        <text:list-item>
          <text:p text:style-name="P29">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27"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20406009" text:style-name="L2">
        <text:list-item>
          <text:p text:style-name="P30"><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0"><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1">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0"><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27"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p text:style-name="Text_20_body"/>
      <text:h text:style-name="P27"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20397321" text:style-name="L3">
        <text:list-item>
          <text:p text:style-name="P32">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2">When you click anywhere after the first character on the page the cursor will go small indicating that this is in graphics mode.</text:p>
        </text:list-item>
        <text:list-item>
          <text:p text:style-name="P32">To set the current pixel press Space. The pixel will go yellow. If you press it again the pixel will toggle between background colour (black) and foreground (yellow).</text:p>
        </text:list-item>
        <text:list-item>
          <text:p text:style-name="P32">Move the cursor using the arrow keys and toggle pixels using Space to draw a whole picture.</text:p>
        </text:list-item>
      </text:list>
      <text:h text:style-name="P27"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20414707" text:style-name="L4">
        <text:list-item>
          <text:p text:style-name="P33">English,</text:p>
        </text:list-item>
        <text:list-item>
          <text:p text:style-name="P33">French,</text:p>
        </text:list-item>
        <text:list-item>
          <text:p text:style-name="P33">Swedish/Finnish/Hungarian</text:p>
        </text:list-item>
        <text:list-item>
          <text:p text:style-name="P33">Czech/Slovak</text:p>
        </text:list-item>
        <text:list-item>
          <text:p text:style-name="P33">German</text:p>
        </text:list-item>
        <text:list-item>
          <text:p text:style-name="P33">Spanish/Portuguese</text:p>
        </text:list-item>
        <text:list-item>
          <text:p text:style-name="P33">Italian</text:p>
        </text:list-item>
      </text:list>
      <text:p text:style-name="Text_20_body">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text:soft-page-break/>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27"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27"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20403021" text:style-name="L5">
        <text:list-item>
          <text:p text:style-name="P34">FTP Server. This is the internet address. Enter the address without the ftp://. This is an example of an FTP server<text:line-break/><text:a xlink:type="simple" xlink:href="ftp://ftp.nluug.nl/"><text:span text:style-name="T2">ftp.nluug.nl</text:span></text:a></text:p>
        </text:list-item>
        <text:list-item>
          <text:p text:style-name="P35">Username: The username that you have been assigned on the FTP server.</text:p>
        </text:list-item>
        <text:list-item>
          <text:p text:style-name="P35">Password: The password that you have been assigned on the FTP server</text:p>
        </text:list-item>
        <text:list-item>
          <text:p text:style-name="P35">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27" text:outline-level="1">Todo list</text:h>
      <text:p text:style-name="Text_20_body">This release has many things not implemented.</text:p>
      <text:list xml:id="list20421061" text:style-name="L6">
        <text:list-item>
          <text:p text:style-name="P36">Ports for Linux and Mac OSX. If you want it badly enough and you know any C++ then join the wxTED project on Google Code.</text:p>
        </text:list-item>
        <text:list-item>
          <text:p text:style-name="P36">Warning about closing an unsaved page.</text:p>
        </text:list-item>
        <text:list-item>
          <text:p text:style-name="P36">Publishing to an external inserter or viewer. FTP</text:p>
        </text:list-item>
        <text:list-item>
          <text:p text:style-name="P36">Double height not rendering exactly correct</text:p>
        </text:list-item>
        <text:list-item>
          <text:p text:style-name="P36">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20416438" text:style-name="L7">
        <text:list-item>
          <text:p text:style-name="P37">End Box/Start Box</text:p>
        </text:list-item>
      </text:list>
      <text:h text:style-name="Heading_20_2" text:outline-level="2">Bugs</text:h>
      <text:list xml:id="list20401359" text:style-name="L8">
        <text:list-item>
          <text:p text:style-name="P38">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8">Save As adds .tti when it shouldn't. You might need to rename files until I fix it.</text:p>
        </text:list-item>
        <text:list-item>
          <text:p text:style-name="P38">Publish path should add a slash at the end if the user doesn't put one in.</text:p>
        </text:list-item>
        <text:list-item>
          <text:p text:style-name="P38">Not really a bug but wxTED FTP uses ASCII mode. Apparently this means that CRLF on Windows gets turned into LF on my web server. Droidfax was updated to cope with LF as a line terminator.</text:p>
        </text:list-item>
      </text:list>
      <text:p text:style-name="Text_20_body"/>
      <text:list xml:id="list39246351" text:continue-numbering="true" text:style-name="L8">
        <text:list-header>
          <text:p text:style-name="P38"/>
        </text:list-header>
      </text:list>
      <text:h text:style-name="P27"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28"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ere are the teletext specifications?</text:p>
      <text:p text:style-name="P12">The standards document is ETSI EN 300 706 V1.2.1. If you want to develop wxTED this is a very useful reference. </text:p>
      <text:p text:style-name="P11">What is the roadmap for development in November 2014?</text:p>
      <text:list xml:id="list20420610" text:style-name="L9">
        <text:list-item>
          <text:p text:style-name="P41">Get carousels working. <text:s/>DONE in 0.02beta</text:p>
        </text:list-item>
        <text:list-item>
          <text:p text:style-name="P41"><text:soft-page-break/>Get Presentation properties working including language support and control flags.<text:line-break/>Language support done 0.03b (West Europe only) DONE in release 1.00.</text:p>
        </text:list-item>
        <text:list-item>
          <text:p text:style-name="P41">Implement Publish, which will send the current page to an inserter or viewer such as VBIT/Droidfax/ATP620/DTP620. FTP Publish DONE for 1.02.</text:p>
        </text:list-item>
        <text:list-item>
          <text:p text:style-name="P41">Implement the edit menu.. Done 1.05</text:p>
        </text:list-item>
        <text:list-item>
          <text:p text:style-name="P41">Migrate to other platforms. A Debian version so that you can run it on a Raspberry Pi. A Mac version is possible but it will have to wait until somebody lends me a Mac.</text:p>
        </text:list-item>
      </text:list>
      <text:p text:style-name="P12"/>
      <text:h text:style-name="P26"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20-12-2014 Support for all ETSI languages. You'll have to make your own character maps and work out what key does what. Cut and paste between wxTED and other applications only works correctly for English. Will need make an inverse function of the mapping funct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20T19:08:00.35</dc:date>
    <dc:creator>Peter Kwan</dc:creator>
    <meta:editing-duration>P26DT3H57M27S</meta:editing-duration>
    <meta:editing-cycles>105</meta:editing-cycles>
    <meta:generator>OpenOffice.org/3.3$Win32 OpenOffice.org_project/330m20$Build-9567</meta:generator>
    <meta:document-statistic meta:table-count="4" meta:image-count="5" meta:object-count="0" meta:page-count="15" meta:paragraph-count="414" meta:word-count="4947" meta:character-count="27306"/>
  </office:meta>
</office:document-meta>
</file>